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C19918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29in" draw:z-index="0"><draw:image xlink:href="Pictures/100000010000055600000300C19918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14:34:37.800825692</meta:creation-date>
    <dc:date>2026-06-21T14:35:35.738767518</dc:date>
    <meta:editing-duration>PT1M1S</meta:editing-duration>
    <meta:editing-cycles>1</meta:editing-cycles>
    <meta:generator>LibreOffice/26.2.3.2$Linux_X86_64 LibreOffice_project/6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